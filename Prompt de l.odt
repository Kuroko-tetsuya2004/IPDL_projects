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2" style:parent-style-name="Policepardéfaut" style:family="text">
      <style:text-properties style:font-name="Arial" style:font-name-complex="Arial"/>
    </style:style>
    <style:style style:name="T3" style:parent-style-name="Policepardéfaut" style:family="text">
      <style:text-properties style:font-name="Arial" style:font-name-complex="Arial"/>
    </style:style>
    <style:style style:name="T4" style:parent-style-name="Policepardéfaut" style:family="text">
      <style:text-properties style:font-name="MS Gothic" style:font-name-asian="MS Gothic" style:font-name-complex="MS Gothic"/>
    </style:style>
    <style:style style:name="T5" style:parent-style-name="Policepardéfaut" style:family="text">
      <style:text-properties style:font-name="Aptos" style:font-name-complex="Aptos"/>
    </style:style>
    <style:style style:name="T6" style:parent-style-name="Policepardéfaut" style:family="text">
      <style:text-properties style:font-name="Aptos" style:font-name-complex="Aptos"/>
    </style:style>
    <style:style style:name="T7" style:parent-style-name="Policepardéfaut" style:family="text">
      <style:text-properties style:font-name="Aptos" style:font-name-complex="Aptos"/>
    </style:style>
    <style:style style:name="T8" style:parent-style-name="Policepardéfaut" style:family="text">
      <style:text-properties style:font-name="MS Gothic" style:font-name-asian="MS Gothic" style:font-name-complex="MS Gothic"/>
    </style:style>
    <style:style style:name="T9" style:parent-style-name="Policepardéfaut" style:family="text">
      <style:text-properties style:font-name="Aptos" style:font-name-complex="Aptos"/>
    </style:style>
    <style:style style:name="T10" style:parent-style-name="Policepardéfaut" style:family="text">
      <style:text-properties style:font-name="Aptos" style:font-name-complex="Aptos"/>
    </style:style>
    <style:style style:name="T11" style:parent-style-name="Policepardéfaut" style:family="text">
      <style:text-properties style:font-name="Aptos" style:font-name-complex="Aptos"/>
    </style:style>
    <style:style style:name="T12" style:parent-style-name="Policepardéfaut" style:family="text">
      <style:text-properties style:font-name="Aptos" style:font-name-complex="Aptos"/>
    </style:style>
    <style:style style:name="T13" style:parent-style-name="Policepardéfaut" style:family="text">
      <style:text-properties style:font-name="Aptos" style:font-name-complex="Aptos"/>
    </style:style>
    <style:style style:name="T14" style:parent-style-name="Policepardéfaut" style:family="text">
      <style:text-properties style:font-name="Aptos" style:font-name-complex="Aptos"/>
    </style:style>
    <style:style style:name="T15" style:parent-style-name="Policepardéfaut" style:family="text">
      <style:text-properties style:font-name="Aptos" style:font-name-complex="Aptos"/>
    </style:style>
    <style:style style:name="T16" style:parent-style-name="Policepardéfaut" style:family="text">
      <style:text-properties style:font-name="MS Gothic" style:font-name-asian="MS Gothic" style:font-name-complex="MS Gothic"/>
    </style:style>
    <style:style style:name="T17" style:parent-style-name="Policepardéfaut" style:family="text">
      <style:text-properties style:font-name="Aptos" style:font-name-complex="Aptos"/>
    </style:style>
    <style:style style:name="T18" style:parent-style-name="Policepardéfaut" style:family="text">
      <style:text-properties style:font-name="MS Gothic" style:font-name-asian="MS Gothic" style:font-name-complex="MS Gothic"/>
    </style:style>
    <style:style style:name="T19" style:parent-style-name="Policepardéfaut" style:family="text">
      <style:text-properties style:font-name="MS Gothic" style:font-name-asian="MS Gothic" style:font-name-complex="MS Gothic"/>
    </style:style>
    <style:style style:name="T20" style:parent-style-name="Policepardéfaut" style:family="text">
      <style:text-properties style:font-name="Aptos" style:font-name-complex="Aptos"/>
    </style:style>
    <style:style style:name="T21" style:parent-style-name="Policepardéfaut" style:family="text">
      <style:text-properties style:font-name="Aptos" style:font-name-complex="Aptos"/>
    </style:style>
    <style:style style:name="T22" style:parent-style-name="Policepardéfaut" style:family="text">
      <style:text-properties style:font-name="MS Gothic" style:font-name-asian="MS Gothic" style:font-name-complex="MS Gothic"/>
    </style:style>
    <style:style style:name="T23" style:parent-style-name="Policepardéfaut" style:family="text">
      <style:text-properties style:font-name="Aptos" style:font-name-complex="Aptos"/>
    </style:style>
    <style:style style:name="T24" style:parent-style-name="Policepardéfaut" style:family="text">
      <style:text-properties style:font-name="Aptos" style:font-name-complex="Aptos"/>
    </style:style>
    <style:style style:name="T25" style:parent-style-name="Policepardéfaut" style:family="text">
      <style:text-properties style:font-name="Aptos" style:font-name-complex="Aptos"/>
    </style:style>
    <style:style style:name="T26" style:parent-style-name="Policepardéfaut" style:family="text">
      <style:text-properties style:font-name="Aptos" style:font-name-complex="Aptos"/>
    </style:style>
    <style:style style:name="T27" style:parent-style-name="Policepardéfaut" style:family="text">
      <style:text-properties style:font-name="MS Gothic" style:font-name-asian="MS Gothic" style:font-name-complex="MS Gothic"/>
    </style:style>
    <style:style style:name="T28" style:parent-style-name="Policepardéfaut" style:family="text">
      <style:text-properties style:font-name="Aptos" style:font-name-complex="Aptos"/>
    </style:style>
    <style:style style:name="T29" style:parent-style-name="Policepardéfaut" style:family="text">
      <style:text-properties style:font-name="MS Gothic" style:font-name-asian="MS Gothic" style:font-name-complex="MS Gothic"/>
    </style:style>
    <style:style style:name="T30" style:parent-style-name="Policepardéfaut" style:family="text">
      <style:text-properties style:font-name="Aptos" style:font-name-complex="Aptos"/>
    </style:style>
    <style:style style:name="T31" style:parent-style-name="Policepardéfaut" style:family="text">
      <style:text-properties style:font-name="Aptos" style:font-name-complex="Aptos"/>
    </style:style>
    <style:style style:name="T32" style:parent-style-name="Policepardéfaut" style:family="text">
      <style:text-properties style:font-name="Aptos" style:font-name-complex="Aptos"/>
    </style:style>
    <style:style style:name="T33" style:parent-style-name="Policepardéfaut" style:family="text">
      <style:text-properties style:font-name="Aptos" style:font-name-complex="Aptos"/>
    </style:style>
    <style:style style:name="T34" style:parent-style-name="Policepardéfaut" style:family="text">
      <style:text-properties style:font-name="Aptos" style:font-name-complex="Aptos"/>
    </style:style>
    <style:style style:name="T35" style:parent-style-name="Policepardéfaut" style:family="text">
      <style:text-properties style:font-name="Aptos" style:font-name-complex="Aptos"/>
    </style:style>
    <style:style style:name="T36" style:parent-style-name="Policepardéfaut" style:family="text">
      <style:text-properties style:font-name="Aptos" style:font-name-complex="Aptos"/>
    </style:style>
    <style:style style:name="T37" style:parent-style-name="Policepardéfaut" style:family="text">
      <style:text-properties style:font-name="MS Gothic" style:font-name-asian="MS Gothic" style:font-name-complex="MS Gothic"/>
    </style:style>
    <style:style style:name="T38" style:parent-style-name="Policepardéfaut" style:family="text">
      <style:text-properties style:font-name="Aptos" style:font-name-complex="Aptos"/>
    </style:style>
    <style:style style:name="T39" style:parent-style-name="Policepardéfaut" style:family="text">
      <style:text-properties style:font-name="Aptos" style:font-name-complex="Aptos"/>
    </style:style>
    <style:style style:name="T40" style:parent-style-name="Policepardéfaut" style:family="text">
      <style:text-properties style:font-name="Aptos" style:font-name-complex="Aptos"/>
    </style:style>
    <style:style style:name="T41" style:parent-style-name="Policepardéfaut" style:family="text">
      <style:text-properties style:font-name="MS Gothic" style:font-name-asian="MS Gothic" style:font-name-complex="MS Gothic"/>
    </style:style>
    <style:style style:name="T42" style:parent-style-name="Policepardéfaut" style:family="text">
      <style:text-properties style:font-name="Aptos" style:font-name-complex="Aptos"/>
    </style:style>
    <style:style style:name="T43" style:parent-style-name="Policepardéfaut" style:family="text">
      <style:text-properties style:font-name="Aptos" style:font-name-complex="Aptos"/>
    </style:style>
    <style:style style:name="T44" style:parent-style-name="Policepardéfaut" style:family="text">
      <style:text-properties style:font-name="Aptos" style:font-name-complex="Aptos"/>
    </style:style>
    <style:style style:name="T45" style:parent-style-name="Policepardéfaut" style:family="text">
      <style:text-properties style:font-name="Aptos" style:font-name-complex="Aptos"/>
    </style:style>
    <style:style style:name="T46" style:parent-style-name="Policepardéfaut" style:family="text">
      <style:text-properties style:font-name="Aptos" style:font-name-complex="Aptos"/>
    </style:style>
    <style:style style:name="T47" style:parent-style-name="Policepardéfaut" style:family="text">
      <style:text-properties style:font-name="Aptos" style:font-name-complex="Aptos"/>
    </style:style>
    <style:style style:name="T48" style:parent-style-name="Policepardéfaut" style:family="text">
      <style:text-properties style:font-name="Aptos" style:font-name-complex="Aptos"/>
    </style:style>
    <style:style style:name="T49" style:parent-style-name="Policepardéfaut" style:family="text">
      <style:text-properties style:font-name="Aptos" style:font-name-complex="Aptos"/>
    </style:style>
    <style:style style:name="T50" style:parent-style-name="Policepardéfaut" style:family="text">
      <style:text-properties style:font-name="Aptos" style:font-name-complex="Aptos"/>
    </style:style>
    <style:style style:name="T51" style:parent-style-name="Policepardéfaut" style:family="text">
      <style:text-properties style:font-name="Aptos" style:font-name-complex="Aptos"/>
    </style:style>
    <style:style style:name="T52" style:parent-style-name="Policepardéfaut" style:family="text">
      <style:text-properties style:font-name="Aptos" style:font-name-complex="Aptos"/>
    </style:style>
    <style:style style:name="T53" style:parent-style-name="Policepardéfaut" style:family="text">
      <style:text-properties style:font-name="Aptos" style:font-name-complex="Aptos"/>
    </style:style>
    <style:style style:name="T54" style:parent-style-name="Policepardéfaut" style:family="text">
      <style:text-properties style:font-name="Aptos" style:font-name-complex="Aptos"/>
    </style:style>
    <style:style style:name="T55" style:parent-style-name="Policepardéfaut" style:family="text">
      <style:text-properties style:font-name="Aptos" style:font-name-complex="Aptos"/>
    </style:style>
    <style:style style:name="T56" style:parent-style-name="Policepardéfaut" style:family="text">
      <style:text-properties style:font-name="Aptos" style:font-name-complex="Aptos"/>
    </style:style>
    <style:style style:name="T57" style:parent-style-name="Policepardéfaut" style:family="text">
      <style:text-properties style:font-name="MS Gothic" style:font-name-asian="MS Gothic" style:font-name-complex="MS Gothic"/>
    </style:style>
    <style:style style:name="T58" style:parent-style-name="Policepardéfaut" style:family="text">
      <style:text-properties style:font-name="Aptos" style:font-name-complex="Aptos"/>
    </style:style>
    <style:style style:name="T59" style:parent-style-name="Policepardéfaut" style:family="text">
      <style:text-properties style:font-name="MS Gothic" style:font-name-asian="MS Gothic" style:font-name-complex="MS Gothic"/>
    </style:style>
    <style:style style:name="T60" style:parent-style-name="Policepardéfaut" style:family="text">
      <style:text-properties style:font-name="Aptos" style:font-name-complex="Aptos"/>
    </style:style>
    <style:style style:name="T61" style:parent-style-name="Policepardéfaut" style:family="text">
      <style:text-properties style:font-name="Aptos" style:font-name-complex="Aptos"/>
    </style:style>
    <style:style style:name="T62" style:parent-style-name="Policepardéfaut" style:family="text">
      <style:text-properties style:font-name="Aptos" style:font-name-complex="Aptos"/>
    </style:style>
    <style:style style:name="T63" style:parent-style-name="Policepardéfaut" style:family="text">
      <style:text-properties style:font-name="Aptos" style:font-name-complex="Aptos"/>
    </style:style>
    <style:style style:name="T64" style:parent-style-name="Policepardéfaut" style:family="text">
      <style:text-properties style:font-name="Aptos" style:font-name-complex="Aptos"/>
    </style:style>
    <style:style style:name="T65" style:parent-style-name="Policepardéfaut" style:family="text">
      <style:text-properties style:font-name="Aptos" style:font-name-complex="Aptos"/>
    </style:style>
    <style:style style:name="T66" style:parent-style-name="Policepardéfaut" style:family="text">
      <style:text-properties style:font-name="MS Gothic" style:font-name-asian="MS Gothic" style:font-name-complex="MS Gothic"/>
    </style:style>
    <style:style style:name="T67" style:parent-style-name="Policepardéfaut" style:family="text">
      <style:text-properties style:font-name="Aptos" style:font-name-complex="Aptos"/>
    </style:style>
    <style:style style:name="T68" style:parent-style-name="Policepardéfaut" style:family="text">
      <style:text-properties style:font-name="MS Gothic" style:font-name-asian="MS Gothic" style:font-name-complex="MS Gothic"/>
    </style:style>
    <style:style style:name="T69" style:parent-style-name="Policepardéfaut" style:family="text">
      <style:text-properties style:font-name="Aptos" style:font-name-complex="Aptos"/>
    </style:style>
    <style:style style:name="T70" style:parent-style-name="Policepardéfaut" style:family="text">
      <style:text-properties style:font-name="Aptos" style:font-name-complex="Aptos"/>
    </style:style>
    <style:style style:name="T71" style:parent-style-name="Policepardéfaut" style:family="text">
      <style:text-properties style:font-name="Aptos" style:font-name-complex="Aptos"/>
    </style:style>
    <style:style style:name="T72" style:parent-style-name="Policepardéfaut" style:family="text">
      <style:text-properties style:font-name="Aptos" style:font-name-complex="Aptos"/>
    </style:style>
    <style:style style:name="T73" style:parent-style-name="Policepardéfaut" style:family="text">
      <style:text-properties style:font-name="Aptos" style:font-name-complex="Aptos"/>
    </style:style>
    <style:style style:name="T74" style:parent-style-name="Policepardéfaut" style:family="text">
      <style:text-properties style:font-name="Aptos" style:font-name-complex="Aptos"/>
    </style:style>
    <style:style style:name="T75" style:parent-style-name="Policepardéfaut" style:family="text">
      <style:text-properties style:font-name="Aptos" style:font-name-complex="Aptos"/>
    </style:style>
    <style:style style:name="T76" style:parent-style-name="Policepardéfaut" style:family="text">
      <style:text-properties style:font-name="Aptos" style:font-name-complex="Aptos"/>
    </style:style>
    <style:style style:name="P77" style:parent-style-name="Normal" style:family="paragraph">
      <style:paragraph-properties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79" style:parent-style-name="Policepardéfaut" style:family="text">
      <style:text-properties style:font-name="MS Gothic" style:font-name-asian="MS Gothic" style:font-name-complex="MS Gothic"/>
    </style:style>
    <style:style style:name="T80" style:parent-style-name="Policepardéfaut" style:family="text">
      <style:text-properties style:font-name="MS Gothic" style:font-name-asian="MS Gothic" style:font-name-complex="MS Gothic"/>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T88" style:parent-style-name="Policepardéfaut" style:family="text">
      <style:text-properties style:font-name="MS Gothic" style:font-name-asian="MS Gothic" style:font-name-complex="MS Gothic" fo:language="en" fo:country="US"/>
    </style:style>
    <style:style style:name="P89" style:parent-style-name="Normal" style:family="paragraph">
      <style:text-properties fo:language="en" fo:country="US"/>
    </style:style>
    <style:style style:name="T90" style:parent-style-name="Policepardéfaut" style:family="text">
      <style:text-properties style:font-name="MS Gothic" style:font-name-asian="MS Gothic" style:font-name-complex="MS Gothic"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Policepardéfaut" style:family="text">
      <style:text-properties style:font-name="MS Gothic" style:font-name-asian="MS Gothic" style:font-name-complex="MS Gothic"/>
    </style:style>
    <style:style style:name="T97" style:parent-style-name="Policepardéfaut" style:family="text">
      <style:text-properties style:font-name="MS Gothic" style:font-name-asian="MS Gothic" style:font-name-complex="MS Gothic"/>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T101" style:parent-style-name="Policepardéfaut" style:family="text">
      <style:text-properties style:font-name="MS Gothic" style:font-name-asian="MS Gothic" style:font-name-complex="MS Gothic"/>
    </style:style>
    <style:style style:name="T102" style:parent-style-name="Policepardéfaut" style:family="text">
      <style:text-properties style:font-name="MS Gothic" style:font-name-asian="MS Gothic" style:font-name-complex="MS Gothic"/>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T111" style:parent-style-name="Policepardéfaut" style:family="text">
      <style:text-properties style:font-name="MS Gothic" style:font-name-asian="MS Gothic" style:font-name-complex="MS Gothic"/>
    </style:style>
    <style:style style:name="T112" style:parent-style-name="Policepardéfaut" style:family="text">
      <style:text-properties style:font-name="MS Gothic" style:font-name-asian="MS Gothic" style:font-name-complex="MS Gothic"/>
    </style:style>
    <style:style style:name="T113" style:parent-style-name="Policepardéfaut" style:family="text">
      <style:text-properties fo:language="en" fo:country="US"/>
    </style:style>
    <style:style style:name="T114" style:parent-style-name="Policepardéfaut" style:family="text">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Policepardéfaut" style:family="text">
      <style:text-properties fo:language="en" fo:country="US"/>
    </style:style>
    <style:style style:name="T118" style:parent-style-name="Policepardéfaut" style:family="text">
      <style:text-properties style:font-name="MS Gothic" style:font-name-asian="MS Gothic" style:font-name-complex="MS Gothic"/>
    </style:style>
    <style:style style:name="T119" style:parent-style-name="Policepardéfaut" style:family="text">
      <style:text-properties style:font-name="MS Gothic" style:font-name-asian="MS Gothic" style:font-name-complex="MS Gothic"/>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T135" style:parent-style-name="Policepardéfaut" style:family="text">
      <style:text-properties style:font-name="MS Gothic" style:font-name-asian="MS Gothic" style:font-name-complex="MS Gothic"/>
    </style:style>
    <style:style style:name="T136" style:parent-style-name="Policepardéfaut" style:family="text">
      <style:text-properties style:font-name="MS Gothic" style:font-name-asian="MS Gothic" style:font-name-complex="MS Gothic"/>
    </style:style>
    <style:style style:name="P137" style:parent-style-name="Normal" style:family="paragraph">
      <style:text-properties fo:language="en" fo:country="US"/>
    </style:style>
    <style:style style:name="T138" style:parent-style-name="Policepardéfaut" style:family="text">
      <style:text-properties fo:language="en" fo:country="US"/>
    </style:style>
    <style:style style:name="P139" style:parent-style-name="Normal" style:family="paragraph">
      <style:text-properties fo:language="en" fo:country="US"/>
    </style:style>
    <style:style style:name="T140" style:parent-style-name="Policepardéfaut" style:family="text">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T149" style:parent-style-name="Policepardéfaut" style:family="text">
      <style:text-properties style:font-name="MS Gothic" style:font-name-asian="MS Gothic" style:font-name-complex="MS Gothic"/>
    </style:style>
    <style:style style:name="T150" style:parent-style-name="Policepardéfaut" style:family="text">
      <style:text-properties style:font-name="MS Gothic" style:font-name-asian="MS Gothic" style:font-name-complex="MS Gothic"/>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office:automatic-styles>
  <office:body>
    <office:text text:use-soft-page-breaks="true">
      <text:p text:style-name="P1">Prompt de l’analyse et de la conception</text:p>
      <text:p text:style-name="Normal">Tu es un ingénieur logiciel senior et architecte de systèmes. À partir de la description de projet fournie, tu dois produire l'intégralité du travail d'analyse et de conception qu'un ingénieur réalise AVANT d'écrire la première ligne de code. Réponds en français. Sois rigoureux, précis et professionnel. Utilise le markdown structuré.<text:s/><text:span text:style-name="T2">═══════════════════════════════════════</text:span><text:s/>DESCRIPTION DU PROJET : """ [COLLE ICI TA DESCRIPTION] """<text:s/><text:span text:style-name="T3">═══════════════════════════════════════</text:span><text:s/><text:span text:style-name="T4">━━━━━━━━━━━━━━━━━━━━━━━━━━━━━━━━━━━━━━</text:span><text:s/>PHASE 1<text:s/><text:span text:style-name="T5">—</text:span><text:s/>COMPR<text:span text:style-name="T6">É</text:span>HENSION DU PROBL<text:span text:style-name="T7">È</text:span>ME<text:s/><text:span text:style-name="T8">━━━━━━━━━━━━━━━━━━━━━━━━━━━━━━━━━━━━━━</text:span><text:s/>## 1. Contexte &amp; probl<text:span text:style-name="T9">é</text:span>matique - Domaine m<text:span text:style-name="T10">é</text:span>tier, contexte organisationnel, probl<text:span text:style-name="T11">è</text:span>me r<text:span text:style-name="T12">é</text:span>solu - Valeur apport<text:span text:style-name="T13">é</text:span>e (pour qui, pourquoi maintenant) - P<text:span text:style-name="T14">é</text:span>rim<text:span text:style-name="T15">è</text:span>tre : IN-SCOPE vs OUT-OF-SCOPE (listes à puces) - Hypothèses et présupposés retenus ## 2. Parties prenantes (Stakeholders) Tableau : | Partie prenante | Rôle | Intérêt dans le projet | Niveau d'influence | Distingue : commanditaire, utilisateurs finaux, équipe technique, systèmes externes, régulateurs. ## 3. Glossaire métier Au moins 15 termes. Format : **Terme** : définition dans le contexte du projet.<text:s/><text:span text:style-name="T16">━━━━━━━━━━━━━━━━━━━━━━━━━━━━━━━━━━━━━━</text:span><text:s/>PHASE 2<text:s/><text:span text:style-name="T17">—</text:span><text:s/>ANALYSE DES BESOINS<text:s/><text:span text:style-name="T18">━━━━━━━━━━━━━━━━━━━━━━━━━━━━━━━━━━━━━━</text:span><text:s/>## 4. Besoins fonctionnels User stories groupées par module : "En tant que [acteur], je veux [action] afin de [bénéfice]." Priorité : Must / Should / Could / Won't (MoSCoW). ## 5. Besoins non-fonctionnels Pour chaque exigence : nom, description, critère de mesure objectif. Couvre : Performance, Sécurité, Disponibilité, Scalabilité, Maintenabilité, Portabilité, Accessibilité, Conformité légale/réglementaire. ## 6. Contraintes du projet - Contraintes techniques (langages imposés, compatibilité, etc.) - Contraintes organisationnelles (budget, délais, équipe) - Contraintes légales et réglementaires (RGPD, normes sectorielles, etc.) - Dépendances externes (APIs tierces, services, partenaires)<text:s/><text:span text:style-name="T19">━━━━━━━━━━━━━━━━━━━━━━━━━━━━━━━━━━━━━━</text:span><text:s/>PHASE 3<text:s/><text:span text:style-name="T20">—</text:span><text:s/>MOD<text:span text:style-name="T21">É</text:span>LISATION FONCTIONNELLE<text:s/><text:span text:style-name="T22">━━━━━━━━━━━━━━━━━━━━━━━━━━━━━━━━━━━━━━</text:span><text:s/>## 7. Acteurs du syst<text:span text:style-name="T23">è</text:span>me Tableau : | Acteur | Type | Description | Cas d'utilisation associ<text:span text:style-name="T24">é</text:span>s | ## 8. Cas d'utilisation Pour chacun des 8<text:s/><text:span text:style-name="T25">à</text:span><text:s/>12 UC principaux : - Nom, Acteur principal, Acteurs secondaires - Pr<text:span text:style-name="T26">é</text:span>conditions / Postconditions - Scénario nominal (étapes numérotées) - Scénarios alternatifs et cas d'exception - Règles métier associées ## 9. Règles métier Liste numérotée de toutes les règles métier identifiées. Format : RG-001 : [description de la règle] ## 10. Modèle du domaine (description textuelle) Liste les entités métier principales, leurs attributs essentiels et les relations entre elles (en attendant le diagramme de classes).<text:s/><text:span text:style-name="T27">━━━━━━━━━━━━━━━━━━━━━━━━━━━━━━━━━━━━━━</text:span><text:s/>PHASE 4<text:s/><text:span text:style-name="T28">—</text:span><text:s/><text:soft-page-break/>CONCEPTION ARCHITECTURALE<text:s/><text:span text:style-name="T29">━━━━━━━━━━━━━━━━━━━━━━━━━━━━━━━━━━━━━━</text:span><text:s/>## 11. Choix architectural - Style retenu (monolithe / microservices / MVC / hexagonal / etc.) + justification - Principes directeurs (s<text:span text:style-name="T30">é</text:span>paration des responsabilit<text:span text:style-name="T31">é</text:span>s, couplage faible, etc.) - Patterns architecturaux appliqu<text:span text:style-name="T32">é</text:span>s (Repository, CQRS, Event-driven, etc.) ## 12. Architecture en couches D<text:span text:style-name="T33">é</text:span>cris chaque couche : r<text:span text:style-name="T34">ô</text:span>le, responsabilit<text:span text:style-name="T35">é</text:span>s, technologies envisag<text:span text:style-name="T36">é</text:span>es, interactions avec les autres couches. ## 13. Stack technologique Tableau : | Composant | Technologie choisie | Alternatives écartées | Justification | Couvre : frontend, backend, base de données, authentification, hébergement, CI/CD, monitoring. ## 14. Architecture de déploiement Décris l'infrastructure cible : serveurs, conteneurs, cloud, réseaux, environnements (dev / staging / prod). ## 15. Sécurité &amp; gestion des accès - Stratégie d'authentification et d'autorisation (RBAC, JWT, OAuth2, etc.) - Protection des données sensibles - Points d'entrée à sécuriser, vecteurs d'attaque à couvrir<text:s/><text:span text:style-name="T37">━━━━━━━━━━━━━━━━━━━━━━━━━━━━━━━━━━━━━━</text:span><text:s/>PHASE 5<text:s/><text:span text:style-name="T38">—</text:span><text:s/>CONCEPTION D<text:span text:style-name="T39">É</text:span>TAILL<text:span text:style-name="T40">É</text:span>E<text:s/><text:span text:style-name="T41">━━━━━━━━━━━━━━━━━━━━━━━━━━━━━━━━━━━━━━</text:span><text:s/>## 16. Mod<text:span text:style-name="T42">è</text:span>le de donn<text:span text:style-name="T43">é</text:span>es - Entit<text:span text:style-name="T44">é</text:span>s, attributs (avec types), cl<text:span text:style-name="T45">é</text:span>s primaires/<text:span text:style-name="T46">é</text:span>trang<text:span text:style-name="T47">è</text:span>res - Relations et cardinalit<text:span text:style-name="T48">é</text:span>s - Contraintes d'int<text:span text:style-name="T49">é</text:span>grit<text:span text:style-name="T50">é</text:span><text:s/>- D<text:span text:style-name="T51">é</text:span>cris le sch<text:span text:style-name="T52">é</text:span>ma comme si tu r<text:span text:style-name="T53">é</text:span>digeais un MCD/MLD Merise ou un diagramme de classes UML ## 17. Interfaces et API - Liste les endpoints principaux (si API REST) : M<text:span text:style-name="T54">é</text:span>thode | Route | Description | Corps de requ<text:span text:style-name="T55">ê</text:span>te | Corps de r<text:span text:style-name="T56">é</text:span>ponse - Ou les interfaces entre composants si architecture interne ## 18. Flux et processus métier Décris sous forme de processus numérotés les flux principaux du système (inscription, traitement d'une commande, validation, notification, etc.)<text:s/><text:span text:style-name="T57">━━━━━━━━━━━━━━━━━━━━━━━━━━━━━━━━━━━━━━</text:span><text:s/>PHASE 6<text:s/><text:span text:style-name="T58">—</text:span><text:s/>PLANIFICATION &amp; RISQUES<text:s/><text:span text:style-name="T59">━━━━━━━━━━━━━━━━━━━━━━━━━━━━━━━━━━━━━━</text:span><text:s/>## 19. D<text:span text:style-name="T60">é</text:span>coupage en modules / composants Liste les modules du syst<text:span text:style-name="T61">è</text:span>me, leurs responsabilit<text:span text:style-name="T62">é</text:span>s et leurs d<text:span text:style-name="T63">é</text:span>pendances entre eux. C'est la base pour organiser le travail d'impl<text:span text:style-name="T64">é</text:span>mentation. ## 20. Plan de d<text:span text:style-name="T65">é</text:span>veloppement indicatif Propose un découpage en itérations ou sprints : | Itération | Objectif | Fonctionnalités livrées | Durée estimée | Commence par les fondations (auth, modèle de données, architecture de base) avant les fonctionnalités métier. ## 21. Analyse des risques Tableau : | # | Risque | Catégorie | Probabilité | Impact | Score | Mitigation | Catégories : Technique / Métier / Organisationnel / Externe. Score = Probabilité × Impact (H=3, M=2, L=1). ## 22. Plan de tests - Types de tests à prévoir : unitaires, intégration, E2E, performance, sécurité, acceptation utilisateur (UAT) - Ce qui doit être testé en priorité - Stratégie de test (TDD, coverage minimal attendu, outils)<text:s/><text:span text:style-name="T66">━━━━━━━━━━━━━━━━━━━━━━━━━━━━━━━━━━━━━━</text:span><text:s/>SYNTH<text:span text:style-name="T67">È</text:span>SE FINALE<text:s/><text:span text:style-name="T68">━━━━━━━━━━━━━━━━━━━━━━━━━━━━━━━━━━━━━━</text:span><text:s/>## 23. R<text:span text:style-name="T69">é</text:span>capitulatif des d<text:span text:style-name="T70">é</text:span>cisions cl<text:span text:style-name="T71">é</text:span>s Liste sous forme de tableau les d<text:span text:style-name="T72">é</text:span>cisions d'architecture et de conception majeures prises, avec leur justification. | D<text:span text:style-name="T73">é</text:span>cision | Option retenue | Options<text:s/><text:span text:style-name="T74">é</text:span>cart<text:span text:style-name="T75">é</text:span>es |<text:s/><text:soft-page-break/>Justification | ## 24. Questions ouvertes &amp; points<text:s/><text:span text:style-name="T76">à</text:span><text:s/>clarifier Liste les ambiguïtés, informations manquantes et décisions qui restent à prendre avec le client ou le product owner avant de démarrer l'implémentation. Numérote chaque question. ## 25. Prérequis avant de commencer le code Checklist concrète de tout ce qui doit être en place avant d'écrire la première ligne : environnement, accès, décisions validées, outils configurés, équipe formée, etc.</text:p>
      <text:p text:style-name="Normal"/>
      <text:p text:style-name="Normal"/>
      <text:p text:style-name="P77"/>
      <text:p text:style-name="P78">Prompt le plan de développement</text:p>
      <text:p text:style-name="Normal">Tu es un ingénieur logiciel senior et chef de projet technique.</text:p>
      <text:p text:style-name="Normal">À partir du dossier de conception ci-dessous, produis le plan de</text:p>
      <text:p text:style-name="Normal">développement complet et opérationnel du projet UMMISCO.</text:p>
      <text:p text:style-name="Normal">Réponds en français. Sois rigoureux, précis et professionnel.</text:p>
      <text:p text:style-name="Normal">Utilise le markdown structuré avec des tableaux.</text:p>
      <text:p text:style-name="Normal"/>
      <text:p text:style-name="Normal"><text:span text:style-name="T79">━━━━━━━━━━━━━━━━━━━━━━━━━━━━━━━━━━━━━━</text:span></text:p>
      <text:p text:style-name="Normal">STACK TECHNOLOGIQUE RETENU (décision finale)</text:p>
      <text:p text:style-name="Normal"><text:span text:style-name="T80">━━━━━━━━━━━━━━━━━━━━━━━━━━━━━━━━━━━━━━</text:span></text:p>
      <text:p text:style-name="Normal">Justification du choix Laravel vs Spring Boot :</text:p>
      <text:p text:style-name="Normal">Contexte décisif — équipe réduite en milieu universitaire sénégalais,</text:p>
      <text:p text:style-name="Normal">profils Java/Spring Boot rares en interne, maintenance post-projet critique.</text:p>
      <text:p text:style-name="Normal">Laravel offre productivité maximale pour petite équipe, maîtrise locale</text:p>
      <text:p text:style-name="Normal">répandue, et un écosystème complet pour tous les besoins du projet.</text:p>
      <text:p text:style-name="Normal">Spring Boot aurait nécessité des profils rares et coûteux à maintenir.</text:p>
      <text:p text:style-name="Normal"/>
      <text:p text:style-name="Normal">| Composant <text:s text:c="8"/>| Technologie retenue <text:s text:c="13"/>| Rôle <text:s text:c="37"/>|</text:p>
      <text:p text:style-name="Normal">|-------------------|----------------------------------|-------------------------------------------|</text:p>
      <text:soft-page-break/>
      <text:p text:style-name="Normal">| Backend <text:s text:c="10"/>| PHP 8.3 / Laravel 11 <text:s text:c="12"/>| API + logique métier + SSR via Inertia <text:s text:c="3"/>|</text:p>
      <text:p text:style-name="Normal">| Frontend <text:s text:c="9"/>| Vue.js 3 (Composition API) <text:s text:c="6"/>| Composants réactifs <text:s text:c="23"/>|</text:p>
      <text:p text:style-name="P81">| Bridge full-stack | Inertia.js <text:s text:c="22"/>| Élimine la duplication API REST/frontend <text:s text:c="2"/>|</text:p>
      <text:p text:style-name="P82">| CSS <text:s text:c="14"/>| Tailwind CSS 3 <text:s text:c="18"/>| Utility-first, cohérence design <text:s text:c="11"/>|</text:p>
      <text:p text:style-name="Normal">| Base de données <text:s text:c="2"/>| PostgreSQL 16 <text:s text:c="19"/>| Robustesse, JSONB, full-text search <text:s text:c="7"/>|</text:p>
      <text:p text:style-name="Normal">| Cache / Sessions <text:s/>| Redis 7 <text:s text:c="25"/>| Sessions, queues, cache applicatif <text:s text:c="8"/>|</text:p>
      <text:p text:style-name="Normal">| Authentification <text:s/>| Keycloak 24 (OAuth2/OIDC) <text:s text:c="7"/>| SSO, RBAC, on-premise — décision actée <text:s text:c="4"/>|</text:p>
      <text:p text:style-name="Normal">| Stockage fichiers | MinIO (S3-compatible) <text:s text:c="11"/>| On-premise, souveraineté données <text:s text:c="10"/>|</text:p>
      <text:p text:style-name="Normal">| Emails / Queues <text:s text:c="2"/>| Laravel Queues + SMTP UCAD <text:s text:c="6"/>| Notifications asynchrones <text:s text:c="17"/>|</text:p>
      <text:p text:style-name="Normal">| Chatbot IA <text:s text:c="7"/>| Ollama (LLaMA 3 / Mistral) <text:s text:c="6"/>| LLM local, souveraineté, coût zéro <text:s text:c="8"/>|</text:p>
      <text:p text:style-name="P83">| Reverse proxy <text:s text:c="4"/>| Nginx <text:s text:c="27"/>| SSL termination, rate limiting <text:s text:c="12"/>|</text:p>
      <text:p text:style-name="Normal">| Conteneurs <text:s text:c="7"/>| Docker + Docker Compose <text:s text:c="9"/>| Reproductibilité tous environnements <text:s text:c="6"/>|</text:p>
      <text:p text:style-name="P84">| CI/CD <text:s text:c="12"/>| GitHub Actions <text:s text:c="18"/>| Lint + tests + build + deploy <text:s text:c="13"/>|</text:p>
      <text:p text:style-name="P85">| Monitoring <text:s text:c="7"/>| Prometheus + Grafana <text:s text:c="12"/>| Métriques, alertes, dashboards <text:s text:c="12"/>|</text:p>
      <text:p text:style-name="P86">| Hébergement <text:s text:c="6"/>| Infrastructure UCAD/UMMISCO <text:s text:c="5"/>| On-premise + Vercel fallback front <text:s text:c="8"/>|</text:p>
      <text:p text:style-name="P87"/>
      <text:p text:style-name="Normal"><text:span text:style-name="T88">━━━━━━━━━━━━━━━━━━━━━━━━━━━━━━━━━━━━━━</text:span></text:p>
      <text:p text:style-name="P89">DOSSIER DE CONCEPTION — RÉSUMÉ STRUCTURÉ</text:p>
      <text:p text:style-name="Normal"><text:span text:style-name="T90">━━━━━━━━━━━━━━━━━━━━━━━━━━━━━━━━━━━━━━</text:span></text:p>
      <text:p text:style-name="P91"/>
      <text:p text:style-name="Normal">PROJET : Portail Web institutionnel UMMISCO</text:p>
      <text:p text:style-name="Normal">Laboratoire de recherche CNRS/IRD/UCAD — Dakar, Sénégal</text:p>
      <text:p text:style-name="Normal">Pluridisciplinaire : épidémiologie, modélisation climatique, FabLab, IoT</text:p>
      <text:p text:style-name="Normal"/>
      <text:p text:style-name="Normal">ARCHITECTURE : Monolithe modulaire</text:p>
      <text:p text:style-name="Normal">- Séparation physique et logique front-office (public) / back-office (admin)</text:p>
      <text:p text:style-name="P92">- Pattern MVC via Laravel + Repository Pattern + Service Layer</text:p>
      <text:p text:style-name="Normal">- Event-driven pour les notifications (Laravel Events/Listeners)</text:p>
      <text:p text:style-name="Normal">- Intégration externe via iframes uniquement (contrainte architecturale)</text:p>
      <text:p text:style-name="Normal"/>
      <text:p text:style-name="Normal">MODULES (13) — par ordre de dépendance :</text:p>
      <text:p text:style-name="P93">M01 AuthModule <text:s text:c="7"/>— OAuth2/OIDC Keycloak, JWT, refresh tokens, sessions</text:p>
      <text:p text:style-name="Normal">M02 UserModule <text:s text:c="7"/>— Profils membres, annuaire, vitrines personnelles</text:p>
      <text:p text:style-name="Normal">M03 PublicPortalModule — Pages publiques, i18n FR/EN, navigation, SEO</text:p>
      <text:p text:style-name="Normal">M04 ContentModule <text:s text:c="4"/>— Publications, workflow validation, éditeur WYSIWYG</text:p>
      <text:p text:style-name="Normal">M05 DatasetModule <text:s text:c="4"/>— Catalogue, upload MinIO, licences, versioning</text:p>
      <text:p text:style-name="Normal">M06 AxeThematiqueModule — Portails thématiques par discipline</text:p>
      <text:p text:style-name="Normal">M07 AdminModule <text:s text:c="6"/>— Back-office, tableaux de bord, audit logs</text:p>
      <text:p text:style-name="Normal">M08 ControleAccesModule — ACL par ressource, synchro Keycloak groups</text:p>
      <text:p text:style-name="Normal">M09 IntegrationModule — Iframes outils doctoraux (Evelop, outil carbone, capteurs)</text:p>
      <text:p text:style-name="Normal">M10 AIModule <text:s text:c="9"/>— Proxy Ollama, contexte session, chatbot</text:p>
      <text:p text:style-name="Normal">M11 NotificationModule — Emails SMTP, templates, newsletter, queues Laravel</text:p>
      <text:p text:style-name="Normal">M12 SearchModule <text:s text:c="5"/>— Full-text PostgreSQL, filtres multi-critères</text:p>
      <text:p text:style-name="Normal">M13 AuditModule <text:s text:c="6"/>— Journalisation append-only, conservation 12 mois</text:p>
      <text:p text:style-name="Normal"/>
      <text:p text:style-name="Normal">ACTEURS &amp; RÔLES (Keycloak RBAC) :</text:p>
      <text:p text:style-name="Normal">- VISITOR <text:s text:c="8"/>: consultation portail public sans auth</text:p>
      <text:p text:style-name="Normal">- RESEARCHER <text:s text:c="5"/>: publication directe, vitrine personnelle</text:p>
      <text:p text:style-name="Normal">- DOCTORAL_STUDENT: soumission → workflow validation obligatoire</text:p>
      <text:p text:style-name="Normal">- PARTNER <text:s text:c="8"/>: accès datasets protégés de son domaine</text:p>
      <text:p text:style-name="Normal">- AXE_ADMIN <text:s text:c="6"/>: chercheur promu, valide contenus de son axe</text:p>
      <text:soft-page-break/>
      <text:p text:style-name="Normal">- SUPER_ADMIN <text:s text:c="4"/>: gestion globale ACL, tous modules</text:p>
      <text:p text:style-name="Normal"/>
      <text:p text:style-name="Normal">RÈGLES MÉTIER CRITIQUES :</text:p>
      <text:p text:style-name="Normal">RG-009 : Doctorants → workflow validation OBLIGATOIRE, jamais de publication directe</text:p>
      <text:p text:style-name="Normal">RG-011 : Validateur = administrateur de l'axe thématique concerné uniquement</text:p>
      <text:p text:style-name="Normal">RG-012 : Chercheurs → publication directe sur leur axe ou leurs propres travaux</text:p>
      <text:p text:style-name="Normal">RG-018 : Toute modification ACL tracée dans audit_logs avec auteur + timestamp</text:p>
      <text:p text:style-name="Normal">RG-022 : Conversations chatbot NON persistées entre sessions (mémoire session only)</text:p>
      <text:p text:style-name="Normal">RG-007 : Tout dataset doit avoir une licence explicite avant publication</text:p>
      <text:p text:style-name="Normal">RG-003 : 5 tentatives login échouées → verrouillage 15 min (géré Keycloak)</text:p>
      <text:p text:style-name="Normal"/>
      <text:p text:style-name="Normal">CONTRAINTES NON NÉGOCIABLES :</text:p>
      <text:p text:style-name="Normal">- Consultation juridique données cardiologie AVANT tout développement lié</text:p>
      <text:p text:style-name="Normal">- Intégration outils doctoraux UNIQUEMENT via iframe (aucun redéveloppement)</text:p>
      <text:p text:style-name="Normal">- Conformité WCAG 2.1 AA sur portail public</text:p>
      <text:p text:style-name="Normal">- Disponibilité ≥ 99% (hors maintenance planifiée)</text:p>
      <text:p text:style-name="Normal">- Couverture tests ≥ 70% sur les classes Service</text:p>
      <text:p text:style-name="Normal">- HTTPS obligatoire sur tous les environnements (y compris staging)</text:p>
      <text:p text:style-name="Normal"/>
      <text:p text:style-name="Normal">RISQUES PRIORITAIRES (score ≥ 6/9) :</text:p>
      <text:p text:style-name="Normal">R-01 (9/9) : Iframes CORS/HTTPS non validées → prototype obligatoire Sprint 0</text:p>
      <text:p text:style-name="Normal">R-02 (9/9) : Conformité juridique données cardiologie → consultation avant dev</text:p>
      <text:p text:style-name="Normal">R-03 (6/9) : RAM/GPU Ollama insuffisant → valider infrastructure Sprint 0</text:p>
      <text:p text:style-name="Normal">R-04 (6/9) : SLA hébergement UCAD non garanti → formaliser avec DSI + Vercel fallback</text:p>
      <text:p text:style-name="Normal">R-05 (6/9) : Bus factor dev → doc inline obligatoire + revues croisées</text:p>
      <text:p text:style-name="Normal">R-06 (6/9) : Scope creep → backlog figé par sprint, tout ajout par PO</text:p>
      <text:p text:style-name="Normal"/>
      <text:p text:style-name="Normal">ENTITÉS MÉTIER PRINCIPALES :</text:p>
      <text:soft-page-break/>
      <text:p text:style-name="Normal">users(id, email, nom, prénom, role, axe_id, statut, keycloak_id, ...)</text:p>
      <text:p text:style-name="Normal">publications(id, titre, résumé, type, statut, visibilité, auteur_id, axe_id, ...)</text:p>
      <text:p text:style-name="Normal">datasets(id→publications, licence, format, version, métadonnées JSONB, ...)</text:p>
      <text:p text:style-name="Normal">axes(id, nom, description, responsable_id→users)</text:p>
      <text:p text:style-name="Normal">workflow_validations(id, publication_id, soumetteur_id, validateur_id, statut, commentaire, ...)</text:p>
      <text:p text:style-name="Normal">controle_acces(id, ressource_type, ressource_id, groupe, permissions JSONB)</text:p>
      <text:p text:style-name="Normal">outils_doctoraux(id, nom, url_iframe, doctorant_id, axe_id, actif)</text:p>
      <text:p text:style-name="P94">audit_logs(id, user_id, action, ressource_type, ressource_id, details JSONB, ip, created_at)</text:p>
      <text:p text:style-name="P95"/>
      <text:p text:style-name="Normal">QUESTIONS OUVERTES BLOQUANTES (à répondre avant Sprint 0) :</text:p>
      <text:p text:style-name="Normal">Q1 : Capacité RAM/GPU du serveur UMMISCO pour Ollama (min. 16 Go RAM, GPU recommandé)</text:p>
      <text:p text:style-name="Normal">Q2 : SLA infrastructure UCAD formalisé avec la DSI ?</text:p>
      <text:p text:style-name="Normal">Q3 : Consultation juridique données cardiologie initiée ?</text:p>
      <text:p text:style-name="Normal">Q4 : URLs stables des iframes (Evelop, outil carbone) confirmées et testables ?</text:p>
      <text:p text:style-name="Normal">Q5 : Préfixe DOI disponible pour les publications du laboratoire ?</text:p>
      <text:p text:style-name="Normal"/>
      <text:p text:style-name="Normal"><text:span text:style-name="T96">━━━━━━━━━━━━━━━━━━━━━━━━━━━━━━━━━━━━━━</text:span></text:p>
      <text:p text:style-name="Normal">PARTIE 2 — SPRINT 0 : FONDATIONS &amp; INFRASTRUCTURE (2 semaines)</text:p>
      <text:p text:style-name="Normal"><text:span text:style-name="T97">━━━━━━━━━━━━━━━━━━━━━━━━━━━━━━━━━━━━━━</text:span></text:p>
      <text:p text:style-name="Normal"/>
      <text:p text:style-name="Normal">Produis pour le Sprint 0 les livrables suivants :</text:p>
      <text:p text:style-name="Normal"/>
      <text:p text:style-name="Normal">## 2.1 Tâches détaillées du Sprint 0</text:p>
      <text:p text:style-name="Normal">Liste exhaustive des tâches avec estimation en jours/développeur :</text:p>
      <text:soft-page-break/>
      <text:p text:style-name="Normal">- Catégorie Infrastructure (Docker, Nginx, SSL, DNS)</text:p>
      <text:p text:style-name="Normal">- Catégorie Backend Laravel (initialisation projet, structure modules, .env)</text:p>
      <text:p text:style-name="Normal">- Catégorie Keycloak (installation, realm UMMISCO, clients, rôles, scopes)</text:p>
      <text:p text:style-name="Normal">- Catégorie Base de données (PostgreSQL, migrations initiales, seeders de base)</text:p>
      <text:p text:style-name="Normal">- Catégorie CI/CD (GitHub Actions : lint + tests + build + deploy staging)</text:p>
      <text:p text:style-name="Normal">- Catégorie Validation technique (prototype iframe, test Ollama, test MinIO)</text:p>
      <text:p text:style-name="Normal">- Catégorie Documentation (README, conventions de code, ADR architecture)</text:p>
      <text:p text:style-name="Normal"/>
      <text:p text:style-name="Normal">## 2.2 Structure complète du projet Laravel</text:p>
      <text:p text:style-name="Normal">Génère l'arborescence complète du projet en tenant compte de l'architecture</text:p>
      <text:p text:style-name="Normal">modulaire retenue avec les 13 modules identifiés. Inclure :</text:p>
      <text:p text:style-name="Normal">- Structure app/ (Models, Services, Repositories, Http/Controllers, Events, Listeners)</text:p>
      <text:p text:style-name="Normal">- Structure modules/ ou app/Modules/ pour chaque module</text:p>
      <text:p text:style-name="Normal">- Structure resources/ (Vue.js + Inertia.js components par module)</text:p>
      <text:p text:style-name="Normal">- Structure database/ (migrations par module, seeders, factories)</text:p>
      <text:p text:style-name="Normal">- Structure tests/ (Unit, Feature, E2E)</text:p>
      <text:p text:style-name="Normal">- Fichiers de configuration (docker-compose.yml, nginx.conf, .env.example)</text:p>
      <text:p text:style-name="Normal"/>
      <text:p text:style-name="Normal">## 2.3 Docker Compose complet</text:p>
      <text:p text:style-name="Normal">Génère le fichier docker-compose.yml complet avec tous les services :</text:p>
      <text:p text:style-name="Normal">- app (Laravel + PHP-FPM 8.3)</text:p>
      <text:p text:style-name="Normal">- nginx (reverse proxy, SSL Let's Encrypt via Certbot)</text:p>
      <text:p text:style-name="Normal">- postgres (PostgreSQL 16, volume persistant)</text:p>
      <text:p text:style-name="Normal">- redis (Redis 7, volume persistant)</text:p>
      <text:p text:style-name="Normal">- keycloak (Keycloak 24, base de données dédiée)</text:p>
      <text:p text:style-name="Normal">- minio (MinIO, volumes persistants, console admin)</text:p>
      <text:p text:style-name="Normal">- ollama (Ollama, volume modèles, GPU si disponible)</text:p>
      <text:p text:style-name="P98">- queue-worker (Laravel Horizon ou simple artisan queue:work)</text:p>
      <text:soft-page-break/>
      <text:p text:style-name="P99">- scheduler (Laravel Scheduler via cron)</text:p>
      <text:p text:style-name="Normal">Inclure les réseaux Docker, les health checks et les variables d'environnement.</text:p>
      <text:p text:style-name="Normal"/>
      <text:p text:style-name="Normal">## 2.4 Variables d'environnement (.env.example)</text:p>
      <text:p text:style-name="Normal">Génère le fichier .env.example complet avec toutes les variables nécessaires :</text:p>
      <text:p text:style-name="Normal">APP_*, DB_*, REDIS_*, KEYCLOAK_*, MINIO_*, OLLAMA_*, MAIL_*, QUEUE_*</text:p>
      <text:p text:style-name="Normal"/>
      <text:p text:style-name="Normal">## 2.5 Prototype de validation technique (Sprint 0)</text:p>
      <text:p text:style-name="Normal">Décris les prototypes à réaliser OBLIGATOIREMENT avant le Sprint 1 :</text:p>
      <text:p text:style-name="Normal">1. Prototype iframe : valider l'intégration d'une iframe externe (CORS, HTTPS, CSP)</text:p>
      <text:p text:style-name="Normal">2. Prototype Ollama : valider le modèle LLM sur l'infrastructure cible (RAM, vitesse)</text:p>
      <text:p text:style-name="Normal">3. Prototype Keycloak : valider le flux OAuth2 Authorization Code + PKCE avec Vue.js</text:p>
      <text:p text:style-name="Normal">4. Prototype MinIO : valider upload/download et génération d'URLs présignées</text:p>
      <text:p text:style-name="Normal"/>
      <text:p text:style-name="P100">## 2.6 Definition of Done (DoD) du Sprint 0</text:p>
      <text:p text:style-name="Normal">Checklist de validation : qu'est-ce qui DOIT être vrai pour que le Sprint 0</text:p>
      <text:p text:style-name="Normal">soit considéré comme terminé et que le Sprint 1 puisse démarrer ?</text:p>
      <text:p text:style-name="Normal"/>
      <text:p text:style-name="Normal"><text:span text:style-name="T101">━━━━━━━━━━━━━━━━━━━━━━━━━━━━━━━━━━━━━━</text:span></text:p>
      <text:p text:style-name="Normal">PARTIE 3 — PLAN DE SPRINTS S1 → S9</text:p>
      <text:p text:style-name="Normal"><text:span text:style-name="T102">━━━━━━━━━━━━━━━━━━━━━━━━━━━━━━━━━━━━━━</text:span></text:p>
      <text:p text:style-name="Normal"/>
      <text:p text:style-name="Normal">## 3.1 Tableau de planning global</text:p>
      <text:p text:style-name="Normal">Produis un tableau récapitulatif de tous les sprints :</text:p>
      <text:p text:style-name="Normal">| Sprint | Durée | Modules | Objectif principal | Livrables clés | Dépendances bloquantes |</text:p>
      <text:p text:style-name="Normal"/>
      <text:soft-page-break/>
      <text:p text:style-name="Normal">Sprints à planifier :</text:p>
      <text:p text:style-name="Normal">- S1 (2 sem.) : M01 AuthModule + M02 UserModule</text:p>
      <text:p text:style-name="Normal">- S2 (2 sem.) : M03 PublicPortalModule (fondation portail public + i18n)</text:p>
      <text:p text:style-name="Normal">- S3 (3 sem.) : M04 ContentModule — publication directe chercheurs</text:p>
      <text:p text:style-name="P103">- S4 (2 sem.) : M04 ContentModule (suite) — workflow validation doctorants + M11 NotificationModule</text:p>
      <text:p text:style-name="P104">- S5 (3 sem.) : M05 DatasetModule + M08 ControleAccesModule</text:p>
      <text:p text:style-name="P105">- S6 (3 sem.) : M06 AxeThematiqueModule + M07 AdminModule (back-office complet)</text:p>
      <text:p text:style-name="P106">- S7 (2 sem.) : M09 IntegrationModule (iframes) + M10 AIModule (chatbot Ollama)</text:p>
      <text:p text:style-name="P107">- S8 (2 sem.) : M12 SearchModule + M13 AuditModule + newsletter + formulaires</text:p>
      <text:p text:style-name="P108">- S9 (3 sem.) : Tests E2E, audit sécurité OWASP, performance, Go-live</text:p>
      <text:p text:style-name="P109"/>
      <text:p text:style-name="Normal">## 3.2 Fiche détaillée de chaque sprint</text:p>
      <text:p text:style-name="Normal">Pour CHAQUE sprint de S1 à S9, produis une fiche structurée :</text:p>
      <text:p text:style-name="Normal"/>
      <text:p text:style-name="Normal">**Sprint Sn — [Titre]**</text:p>
      <text:p text:style-name="Normal">Durée : X semaines | Modules : Mxx, Myy</text:p>
      <text:p text:style-name="Normal"/>
      <text:p text:style-name="Normal">User stories livrées :</text:p>
      <text:p text:style-name="Normal">| ID | User story | Acteur | Priorité MoSCoW |</text:p>
      <text:p text:style-name="Normal"/>
      <text:p text:style-name="Normal">Tâches techniques (avec estimation en jours/dev) :</text:p>
      <text:p text:style-name="Normal">→ Migrations &amp; modèles Eloquent</text:p>
      <text:p text:style-name="Normal">→ Services métier (règles RG-* appliquées)</text:p>
      <text:p text:style-name="Normal">→ Repositories + interfaces</text:p>
      <text:p text:style-name="Normal">→ Contrôleurs Laravel + routes</text:p>
      <text:p text:style-name="Normal">→ Composants Vue.js / Inertia.js</text:p>
      <text:p text:style-name="Normal">→ Tests unitaires + Feature tests</text:p>
      <text:soft-page-break/>
      <text:p text:style-name="Normal">→ Documentation</text:p>
      <text:p text:style-name="Normal"/>
      <text:p text:style-name="Normal">Risques spécifiques au sprint :</text:p>
      <text:p text:style-name="Normal">Dépendances bloquantes :</text:p>
      <text:p text:style-name="Normal">Definition of Done :</text:p>
      <text:p text:style-name="Normal"/>
      <text:p text:style-name="Normal">## 3.3 Jalons (Milestones) du projet</text:p>
      <text:p text:style-name="Normal">Identifie et détaille les 4 jalons majeurs :</text:p>
      <text:p text:style-name="Normal"/>
      <text:p text:style-name="Normal">JALON 1 — MVP (fin S4, semaine ~11)</text:p>
      <text:p text:style-name="Normal">Ce qui est livrable : auth + portail public + publications chercheurs + workflow validation</text:p>
      <text:p text:style-name="Normal">Valeur métier : le laboratoire peut publier ses contenus et les doctorants soumettre</text:p>
      <text:p text:style-name="Normal"/>
      <text:p text:style-name="Normal">JALON 2 — Livraison intermédiaire (fin S6, semaine ~18)</text:p>
      <text:p text:style-name="Normal">Ce qui est livrable : datasets + portails thématiques + back-office complet</text:p>
      <text:p text:style-name="Normal">Valeur métier : partenaires peuvent accéder aux données, admins gèrent tout</text:p>
      <text:p text:style-name="Normal"/>
      <text:p text:style-name="Normal">JALON 3 — Release Candidate (fin S8, semaine ~22)</text:p>
      <text:p text:style-name="Normal">Ce qui est livrable : toutes fonctionnalités y compris IA + iframes + recherche</text:p>
      <text:p text:style-name="Normal">Valeur métier : 100% des user stories Must livrées</text:p>
      <text:p text:style-name="Normal"/>
      <text:p text:style-name="P110">JALON 4 — Go-live (fin S9, semaine ~24)</text:p>
      <text:p text:style-name="Normal">Ce qui est livrable : système validé, sécurisé, performant, déployé en production</text:p>
      <text:p text:style-name="Normal"/>
      <text:p text:style-name="Normal">## 3.4 Diagramme de Gantt textuel</text:p>
      <text:p text:style-name="Normal">Représente visuellement le calendrier sur 24 semaines en ASCII/markdown</text:p>
      <text:p text:style-name="Normal">avec les sprints et les jalons marqués.</text:p>
      <text:p text:style-name="Normal"/>
      <text:soft-page-break/>
      <text:p text:style-name="Normal"><text:span text:style-name="T111">━━━━━━━━━━━━━━━━━━━━━━━━━━━━━━━━━━━━━━</text:span></text:p>
      <text:p text:style-name="Normal">PARTIE 4 — DÉCOMPOSITION TECHNIQUE PAR MODULE (Laravel 11)</text:p>
      <text:p text:style-name="Normal"><text:span text:style-name="T112">━━━━━━━━━━━━━━━━━━━━━━━━━━━━━━━━━━━━━━</text:span></text:p>
      <text:p text:style-name="Normal"/>
      <text:p text:style-name="Normal">Pour chacun des 13 modules, produis une fiche technique complète.</text:p>
      <text:p text:style-name="Normal"/>
      <text:p text:style-name="Normal">Structure de chaque fiche :</text:p>
      <text:p text:style-name="Normal">---</text:p>
      <text:p text:style-name="Normal">MODULE Mxx — [NomModule]</text:p>
      <text:p text:style-name="Normal">Sprint : Sn | Dépendances : Mx, My</text:p>
      <text:p text:style-name="Normal"/>
      <text:p text:style-name="Normal">MODÈLES ELOQUENT :</text:p>
      <text:p text:style-name="Normal">- Nom du modèle, attributs ($fillable, $casts, relations Eloquent)</text:p>
      <text:p text:style-name="Normal">- Migrations associées (noms de colonnes, types, contraintes)</text:p>
      <text:p text:style-name="Normal"/>
      <text:p text:style-name="Normal">INTERFACES REPOSITORY :</text:p>
      <text:p text:style-name="Normal">- Interface avec toutes les méthodes CRUD + méthodes métier</text:p>
      <text:p text:style-name="Normal">- Implémentation EloquentRepository</text:p>
      <text:p text:style-name="Normal"/>
      <text:p text:style-name="Normal">SERVICES MÉTIER :</text:p>
      <text:p text:style-name="Normal">- Classe Service avec toutes les méthodes</text:p>
      <text:p text:style-name="Normal">- Règles métier appliquées (RG-xxx)</text:p>
      <text:p text:style-name="Normal">- Events Laravel émis</text:p>
      <text:p text:style-name="Normal"/>
      <text:p text:style-name="Normal">CONTRÔLEURS &amp; ROUTES :</text:p>
      <text:p text:style-name="Normal">- Routes web (Inertia.js) OU API selon le module</text:p>
      <text:soft-page-break/>
      <text:p text:style-name="Normal">- Méthodes du contrôleur (index, show, store, update, destroy + méthodes métier)</text:p>
      <text:p text:style-name="Normal">- Form Requests (validation Laravel)</text:p>
      <text:p text:style-name="Normal">- Resources (transformations de données)</text:p>
      <text:p text:style-name="Normal"/>
      <text:p text:style-name="Normal">COMPOSANTS VUE.JS (Inertia.js) :</text:p>
      <text:p text:style-name="Normal">- Pages Inertia.js (composants Vue.js par vue)</text:p>
      <text:p text:style-name="Normal">- Composants réutilisables du module</text:p>
      <text:p text:style-name="Normal"/>
      <text:p text:style-name="Normal">TESTS :</text:p>
      <text:p text:style-name="Normal">- Tests unitaires (PHPUnit) — méthodes à tester en priorité</text:p>
      <text:p text:style-name="Normal">- Feature tests (HTTP tests Laravel) — scénarios à couvrir</text:p>
      <text:p text:style-name="Normal">- Factories et Seeders nécessaires</text:p>
      <text:p text:style-name="Normal"/>
      <text:p text:style-name="Normal">RISQUES TECHNIQUES :</text:p>
      <text:p text:style-name="Normal">DEFINITION OF DONE :</text:p>
      <text:p text:style-name="Normal">---</text:p>
      <text:p text:style-name="Normal"/>
      <text:p text:style-name="Normal">MODULES À DÉCOMPOSER :</text:p>
      <text:p text:style-name="Normal">M01 AuthModule</text:p>
      <text:p text:style-name="Normal"><text:s text:c="2"/>Focus : OAuth2 Authorization Code + PKCE avec Keycloak,</text:p>
      <text:p text:style-name="Normal"><text:s text:c="2"/>middleware Laravel d'authentification, gestion refresh tokens Redis,</text:p>
      <text:p text:style-name="Normal"><text:s text:c="2"/>synchronisation des rôles Keycloak → session Laravel</text:p>
      <text:p text:style-name="Normal"/>
      <text:p text:style-name="Normal">M02 UserModule</text:p>
      <text:p text:style-name="Normal"><text:s text:c="2"/>Focus : profils Eloquent liés à keycloak_id, vitrines publiques,</text:p>
      <text:p text:style-name="Normal"><text:s text:c="2"/>upload photo vers MinIO, annuaire paginé avec filtres</text:p>
      <text:p text:style-name="Normal"/>
      <text:p text:style-name="Normal">M03 PublicPortalModule</text:p>
      <text:soft-page-break/>
      <text:p text:style-name="Normal"><text:s text:c="2"/>Focus : pages Inertia.js sans auth, i18n Laravel (fr/en) avec</text:p>
      <text:p text:style-name="Normal"><text:s text:c="2"/>fichiers de traduction, SEO (meta tags, sitemap, structured data)</text:p>
      <text:p text:style-name="Normal"/>
      <text:p text:style-name="Normal">M04 ContentModule</text:p>
      <text:p text:style-name="Normal"><text:s text:c="2"/>Focus : polymorphisme Eloquent pour les types de publications,</text:p>
      <text:p text:style-name="Normal"><text:s text:c="2"/>éditeur WYSIWYG (TipTap ou Quill), machine à états Eloquent</text:p>
      <text:p text:style-name="Normal"><text:s text:c="2"/>pour le workflow (brouillon→soumis→en_revision→publié→archivé),</text:p>
      <text:p text:style-name="Normal"><text:s text:c="2"/>Laravel Events pour les notifications de workflow</text:p>
      <text:p text:style-name="Normal"/>
      <text:p text:style-name="Normal">M05 DatasetModule</text:p>
      <text:p text:style-name="Normal"><text:s text:c="2"/>Focus : upload multipart vers MinIO via Laravel Storage,</text:p>
      <text:p text:style-name="Normal"><text:s text:c="2"/>génération URLs présignées, versioning des datasets,</text:p>
      <text:p text:style-name="Normal"><text:s text:c="2"/>gestion des licences, téléchargement sécurisé</text:p>
      <text:p text:style-name="Normal"/>
      <text:p text:style-name="Normal">M06 AxeThematiqueModule</text:p>
      <text:p text:style-name="Normal"><text:s text:c="2"/>Focus : portails thématiques comme sous-sections Inertia,</text:p>
      <text:p text:style-name="Normal"><text:s text:c="2"/>relation many-to-many users↔axes, page publique par axe</text:p>
      <text:p text:style-name="Normal"/>
      <text:p text:style-name="Normal">M07 AdminModule</text:p>
      <text:p text:style-name="Normal"><text:s text:c="2"/>Focus : back-office Inertia.js séparé (middleware vérifiant SUPER_ADMIN</text:p>
      <text:p text:style-name="Normal"><text:s text:c="2"/>ou AXE_ADMIN), tableaux de bord avec métriques (publications par statut,</text:p>
      <text:p text:style-name="Normal"><text:s text:c="2"/>activité récente, datasets), interface de gestion des contenus</text:p>
      <text:p text:style-name="Normal"/>
      <text:p text:style-name="Normal">M08 ControleAccesModule</text:p>
      <text:p text:style-name="Normal"><text:s text:c="2"/>Focus : policy Laravel (Gates &amp; Policies) pour chaque ressource,</text:p>
      <text:p text:style-name="Normal"><text:s text:c="2"/>synchronisation groupes Keycloak via Admin REST API Keycloak,</text:p>
      <text:p text:style-name="Normal"><text:s text:c="2"/>table controle_acces pour permissions fines</text:p>
      <text:p text:style-name="Normal"/>
      <text:soft-page-break/>
      <text:p text:style-name="Normal">M09 IntegrationModule</text:p>
      <text:p text:style-name="Normal"><text:s text:c="2"/>Focus : modèle OutilDoctoral avec url_iframe validée,</text:p>
      <text:p text:style-name="Normal"><text:s text:c="2"/><text:span text:style-name="T113">composant Vue.js IframeViewer (sandboxing, allow-list CSP),</text:span></text:p>
      <text:p text:style-name="Normal"><text:span text:style-name="T114"><text:s text:c="2"/></text:span>interface d'administration des outils (activation/désactivation)</text:p>
      <text:p text:style-name="Normal"/>
      <text:p text:style-name="Normal">M10 AIModule</text:p>
      <text:p text:style-name="Normal"><text:s text:c="2"/>Focus : client HTTP Laravel vers API Ollama locale,</text:p>
      <text:p text:style-name="Normal"><text:s text:c="2"/>gestion du contexte de conversation en session Laravel (pas de DB),</text:p>
      <text:p text:style-name="Normal"><text:s text:c="2"/>prompt système injectant le contexte UMMISCO,</text:p>
      <text:p text:style-name="Normal"><text:s text:c="2"/>fallback gracieux si Ollama indisponible</text:p>
      <text:p text:style-name="Normal"/>
      <text:p text:style-name="Normal">M11 NotificationModule</text:p>
      <text:p text:style-name="Normal"><text:s text:c="2"/>Focus : Laravel Mail + Queue (jobs asynchrones),</text:p>
      <text:p text:style-name="Normal"><text:s text:c="2"/>templates Blade pour emails (soumission, validation, rejet, newsletter),</text:p>
      <text:p text:style-name="Normal"><text:s text:c="2"/>gestion des désabonnements newsletter,</text:p>
      <text:p text:style-name="Normal"><text:s text:c="2"/>Laravel Scheduler pour envois périodiques</text:p>
      <text:p text:style-name="Normal"/>
      <text:p text:style-name="P115">M12 SearchModule</text:p>
      <text:p text:style-name="P116"><text:s text:c="2"/>Focus : full-text search PostgreSQL (tsvector + GIN index),</text:p>
      <text:p text:style-name="Normal"><text:span text:style-name="T117"><text:s text:c="2"/></text:span>scope Eloquent de recherche multi-entités,</text:p>
      <text:p text:style-name="Normal"><text:s text:c="2"/>filtres combinables (axe, type, auteur, année, langue, licence),</text:p>
      <text:p text:style-name="Normal"><text:s text:c="2"/>pagination avec Laravel Paginator</text:p>
      <text:p text:style-name="Normal"/>
      <text:p text:style-name="Normal">M13 AuditModule</text:p>
      <text:p text:style-name="Normal"><text:s text:c="2"/>Focus : Eloquent Observer sur tous les modèles sensibles,</text:p>
      <text:p text:style-name="Normal"><text:s text:c="2"/>table audit_logs append-only (pas d'UPDATE ni DELETE),</text:p>
      <text:p text:style-name="Normal"><text:s text:c="2"/>interface admin de consultation avec filtres,</text:p>
      <text:p text:style-name="Normal"><text:s text:c="2"/>commande Artisan de purge des logs &gt; 12 mois</text:p>
      <text:p text:style-name="Normal"/>
      <text:p text:style-name="Normal"><text:span text:style-name="T118">━━━━━━━━━━━━━━━━━━━━━━━━━━━━━━━━━━━━━━</text:span></text:p>
      <text:p text:style-name="Normal">PARTIE 5 — STRATÉGIE DE TESTS &amp; SÉCURITÉ</text:p>
      <text:p text:style-name="Normal"><text:span text:style-name="T119">━━━━━━━━━━━━━━━━━━━━━━━━━━━━━━━━━━━━━━</text:span></text:p>
      <text:p text:style-name="Normal"/>
      <text:p text:style-name="Normal">## 5.1 Stratégie de tests par type</text:p>
      <text:p text:style-name="Normal"/>
      <text:p text:style-name="Normal">Pour chaque type de test, détaille : périmètre, outils, commandes,</text:p>
      <text:p text:style-name="Normal">seuils de couverture, intégration CI/CD, cas de tests prioritaires.</text:p>
      <text:p text:style-name="Normal"/>
      <text:p text:style-name="Normal">TYPE 1 — Tests unitaires (PHPUnit + Laravel)</text:p>
      <text:p text:style-name="Normal">- Cible : toutes les classes Service (≥ 70% coverage)</text:p>
      <text:p text:style-name="Normal">- Focus prioritaire : AuthService, ContentService (workflow), ControleAccesService</text:p>
      <text:p text:style-name="Normal">- Outils : PHPUnit, Mockery pour les mocks, pest (optionnel)</text:p>
      <text:p text:style-name="Normal">- Commande : php artisan test --coverage --min=70</text:p>
      <text:p text:style-name="Normal"/>
      <text:p text:style-name="Normal">TYPE 2 — Feature tests / Tests d'intégration (Laravel HTTP Tests)</text:p>
      <text:p text:style-name="Normal">- Cible : tous les endpoints (routes web Inertia + éventuels endpoints API)</text:p>
      <text:p text:style-name="Normal">- Focus : scénarios UC-01 à UC-12 complets</text:p>
      <text:p text:style-name="Normal">- Base de données : SQLite en mémoire ou PostgreSQL de test dédié</text:p>
      <text:p text:style-name="P120">- Commande : php artisan test --testsuite=Feature</text:p>
      <text:p text:style-name="P121"/>
      <text:p text:style-name="P122">TYPE 3 — Tests End-to-End (Playwright + Laravel Dusk)</text:p>
      <text:p text:style-name="Normal">- Cible : flux métier complets navigateur</text:p>
      <text:p text:style-name="Normal">- Flux obligatoires :</text:p>
      <text:p text:style-name="Normal"><text:s text:c="2"/>F1 : Inscription → authentification Keycloak → accès portail</text:p>
      <text:soft-page-break/>
      <text:p text:style-name="Normal"><text:s text:c="2"/>F2 : Chercheur publie un article → visible sur portail public</text:p>
      <text:p text:style-name="Normal"><text:s text:c="2"/>F3 : Doctorant soumet → admin valide → notification → publication</text:p>
      <text:p text:style-name="Normal"><text:s text:c="2"/>F4 : Partenaire accède à un dataset protégé</text:p>
      <text:p text:style-name="Normal"><text:s text:c="2"/>F5 : Administrateur modifie les droits ACL d'un utilisateur</text:p>
      <text:p text:style-name="P123">- Commande : npx playwright test</text:p>
      <text:p text:style-name="P124"/>
      <text:p text:style-name="P125">TYPE 4 — Tests de performance (k6)</text:p>
      <text:p text:style-name="Normal">- Scénarios : 500 utilisateurs simultanés sur portail public</text:p>
      <text:p text:style-name="Normal">- Seuils : LCP &lt; 2,5s (p95), temps réponse API &lt; 500ms (p99)</text:p>
      <text:p text:style-name="P126">- Commande : k6 run tests/performance/load.js</text:p>
      <text:p text:style-name="P127"/>
      <text:p text:style-name="Normal">TYPE 5 — Tests de sécurité (OWASP ZAP + Snyk)</text:p>
      <text:p text:style-name="Normal">- OWASP Top 10 : injection SQL, XSS, CSRF, IDOR, mauvaise config sécurité</text:p>
      <text:p text:style-name="Normal">- Scan dépendances : snyk test (composer.lock + package-lock.json)</text:p>
      <text:p text:style-name="Normal">- Audit code statique : SonarQube ou Larastan (PHPStan Laravel)</text:p>
      <text:p text:style-name="Normal">- Commande ZAP : zap-full-scan.py -t https://staging.ummisco.xxx</text:p>
      <text:p text:style-name="Normal"/>
      <text:p text:style-name="Normal">TYPE 6 — Tests accessibilité (axe-core)</text:p>
      <text:p text:style-name="Normal">- Cible : toutes les pages du portail public</text:p>
      <text:p text:style-name="Normal">- Standard : WCAG 2.1 AA — 0 erreur critique</text:p>
      <text:p text:style-name="Normal">- Commande : npx axe --dir tests/a11y</text:p>
      <text:p text:style-name="Normal"/>
      <text:p text:style-name="Normal">## 5.2 Pipeline CI/CD GitHub Actions</text:p>
      <text:p text:style-name="Normal">Produis le fichier .github/workflows/ci.yml complet incluant :</text:p>
      <text:p text:style-name="Normal">- Job 1 : lint (PHP CS Fixer, ESLint, Prettier)</text:p>
      <text:p text:style-name="Normal">- Job 2 : analyse statique (Larastan niveau max)</text:p>
      <text:p text:style-name="P128">- Job 3 : tests unitaires + feature (avec rapport de coverage)</text:p>
      <text:p text:style-name="P129">- Job 4 : build assets (npm run build)</text:p>
      <text:soft-page-break/>
      <text:p text:style-name="P130">- Job 5 : tests E2E Playwright (sur push develop)</text:p>
      <text:p text:style-name="Normal">- Job 6 : scan sécurité Snyk (sur PR vers main)</text:p>
      <text:p text:style-name="P131">- Job 7 : build image Docker + push registry</text:p>
      <text:p text:style-name="P132">- Job 8 : deploy staging (sur merge develop) + smoke tests</text:p>
      <text:p text:style-name="P133">- Job 9 : deploy production (sur tag release/*)</text:p>
      <text:p text:style-name="P134"/>
      <text:p text:style-name="Normal">## 5.3 Checklist sécurité sprint par sprint</text:p>
      <text:p text:style-name="Normal">Pour chaque sprint S1→S9, liste les points de sécurité à valider avant</text:p>
      <text:p text:style-name="Normal">de clore le sprint (revue de code sécurité, headers HTTP, validation inputs,</text:p>
      <text:p text:style-name="Normal">permissions Keycloak testées, audit log vérifié, etc.)</text:p>
      <text:p text:style-name="Normal"/>
      <text:p text:style-name="Normal">## 5.4 Configuration sécurité Laravel (fichier à produire)</text:p>
      <text:p text:style-name="Normal">Génère la configuration de sécurité Laravel complète :</text:p>
      <text:p text:style-name="Normal">- Middleware de sécurité (CSP, X-Frame-Options, HSTS, X-Content-Type)</text:p>
      <text:p text:style-name="Normal">- Configuration Sanctum/Keycloak pour les tokens</text:p>
      <text:p text:style-name="Normal">- Rate limiting sur les routes sensibles (login, soumission, chatbot)</text:p>
      <text:p text:style-name="Normal">- Validation des uploads (MIME type, taille max, scan ClamAV)</text:p>
      <text:p text:style-name="Normal">- Headers de sécurité Nginx à configurer</text:p>
      <text:p text:style-name="Normal"/>
      <text:p text:style-name="Normal"><text:span text:style-name="T135">━━━━━━━━━━━━━━━━━━━━━━━━━━━━━━━━━━━━━━</text:span></text:p>
      <text:p text:style-name="Normal">PARTIE 6 — DÉPLOIEMENT &amp; MISE EN PRODUCTION</text:p>
      <text:p text:style-name="Normal"><text:span text:style-name="T136">━━━━━━━━━━━━━━━━━━━━━━━━━━━━━━━━━━━━━━</text:span></text:p>
      <text:p text:style-name="Normal"/>
      <text:p text:style-name="Normal">## 6.1 Architecture de déploiement détaillée</text:p>
      <text:p text:style-name="Normal">Décris la topologie complète des services Docker en production :</text:p>
      <text:p text:style-name="Normal">- Topologie réseau (zones DMZ, réseau interne Docker, exposition ports)</text:p>
      <text:soft-page-break/>
      <text:p text:style-name="P137">- Configuration Nginx (virtual hosts, SSL/TLS 1.3, rate limiting, gzip, cache)</text:p>
      <text:p text:style-name="Normal">- Stratégie de backup automatisé :</text:p>
      <text:p text:style-name="Normal"><text:s text:c="2"/>→ PostgreSQL : pg_dump quotidien, rétention 30 jours, test restauration mensuel</text:p>
      <text:p text:style-name="Normal"><text:s text:c="2"/>→ MinIO : réplication ou snapshot quotidien</text:p>
      <text:p text:style-name="Normal"><text:s text:c="2"/>→ Redis : RDB snapshot toutes les heures</text:p>
      <text:p text:style-name="Normal"><text:s text:c="2"/><text:span text:style-name="T138">→ Keycloak : export realm JSON hebdomadaire</text:span></text:p>
      <text:p text:style-name="P139">- Monitoring Prometheus + Grafana :</text:p>
      <text:p text:style-name="Normal"><text:span text:style-name="T140"><text:s text:c="2"/></text:span>→ Métriques applicatives Laravel (réponse, queues, jobs failed)</text:p>
      <text:p text:style-name="Normal"><text:s text:c="2"/>→ Métriques système (CPU, RAM, disque, réseau)</text:p>
      <text:p text:style-name="Normal"><text:s text:c="2"/>→ Métriques PostgreSQL (connexions, queries lentes)</text:p>
      <text:p text:style-name="Normal"><text:s text:c="2"/>→ Alertes : disponibilité &lt; 99%, queue jobs failed &gt; 10, disque &gt; 80%</text:p>
      <text:p text:style-name="Normal"/>
      <text:p text:style-name="Normal">## 6.2 Runbook de déploiement</text:p>
      <text:p text:style-name="Normal">Produis les runbooks step-by-step pour :</text:p>
      <text:p text:style-name="Normal"/>
      <text:p text:style-name="Normal">RUNBOOK A — Premier déploiement (from scratch)</text:p>
      <text:p text:style-name="Normal">1. Prérequis serveur (OS, Docker, Git, certificats)</text:p>
      <text:p text:style-name="Normal">2. Clone du repository + configuration .env production</text:p>
      <text:p text:style-name="Normal">3. Démarrage des services Docker dans l'ordre correct</text:p>
      <text:p text:style-name="Normal">4. Initialisation Keycloak (realm, clients, rôles, premier super admin)</text:p>
      <text:p text:style-name="Normal">5. Migrations et seeders de base (php artisan migrate --seed)</text:p>
      <text:p text:style-name="P141">6. Build assets production (npm run build)</text:p>
      <text:p text:style-name="Normal">7. Configuration Nginx + SSL Let's Encrypt</text:p>
      <text:p text:style-name="Normal">8. Smoke tests de validation</text:p>
      <text:p text:style-name="Normal">9. Mise en place du monitoring</text:p>
      <text:p text:style-name="Normal"/>
      <text:p text:style-name="Normal">RUNBOOK B — Mise à jour applicative (zero-downtime)</text:p>
      <text:p text:style-name="Normal">1. Pull nouvelle image Docker</text:p>
      <text:soft-page-break/>
      <text:p text:style-name="Normal">2. Exécution des migrations en maintenance mode</text:p>
      <text:p text:style-name="P142">3. Rotation des conteneurs (rolling update Docker Compose)</text:p>
      <text:p text:style-name="P143">4. Cache clear + optimize (php artisan optimize)</text:p>
      <text:p text:style-name="P144">5. Vérification health checks</text:p>
      <text:p text:style-name="Normal">6. Désactivation maintenance mode</text:p>
      <text:p text:style-name="Normal"/>
      <text:p text:style-name="Normal">RUNBOOK C — Rollback d'urgence</text:p>
      <text:p text:style-name="Normal">1. Identifier la dernière version stable</text:p>
      <text:p text:style-name="Normal">2. Rollback image Docker vers tag précédent</text:p>
      <text:p text:style-name="Normal">3. Rollback migrations si nécessaire (php artisan migrate:rollback)</text:p>
      <text:p text:style-name="Normal">4. Validation que le système est restauré</text:p>
      <text:p text:style-name="Normal"/>
      <text:p text:style-name="Normal">## 6.3 Configuration Nginx production</text:p>
      <text:p text:style-name="Normal">Génère le fichier nginx.conf complet pour le portail UMMISCO incluant :</text:p>
      <text:p text:style-name="P145">- Virtual host portail public (HTTPS, HTTP/2, HSTS)</text:p>
      <text:p text:style-name="Normal">- Virtual host back-office admin (sous-domaine séparé, restriction IP si possible)</text:p>
      <text:p text:style-name="Normal">- Proxy pass vers PHP-FPM</text:p>
      <text:p text:style-name="Normal">- Headers de sécurité (CSP, X-Frame-Options sauf iframes whitelistées)</text:p>
      <text:p text:style-name="Normal">- Gzip compression</text:p>
      <text:p text:style-name="Normal">- Cache des assets statiques (1 an)</text:p>
      <text:p text:style-name="P146">- Rate limiting (connexion : 10 req/min, API : 60 req/min)</text:p>
      <text:p text:style-name="P147"/>
      <text:p text:style-name="P148">## 6.4 Checklist Go-live (Sprint 9)</text:p>
      <text:p text:style-name="Normal">Produis la checklist finale de mise en production organisée par catégorie :</text:p>
      <text:p text:style-name="Normal">- Infrastructure &amp; serveurs (25 points)</text:p>
      <text:p text:style-name="Normal">- Sécurité &amp; certificats (15 points)</text:p>
      <text:p text:style-name="Normal">- Performance &amp; optimisation (10 points)</text:p>
      <text:p text:style-name="Normal">- Données &amp; migrations (8 points)</text:p>
      <text:soft-page-break/>
      <text:p text:style-name="Normal">- Tests de recette UAT (10 points)</text:p>
      <text:p text:style-name="Normal">- Communication utilisateurs (5 points)</text:p>
      <text:p text:style-name="Normal">Chaque point avec : responsable, comment valider, bloquant ou non</text:p>
      <text:p text:style-name="Normal"/>
      <text:p text:style-name="Normal">## 6.5 Plan de maintenance post-lancement</text:p>
      <text:p text:style-name="Normal">Récurrences à définir :</text:p>
      <text:p text:style-name="Normal">- Quotidien : vérification alertes monitoring, backups</text:p>
      <text:p text:style-name="Normal">- Hebdomadaire : revue des logs d'erreurs, queue jobs failed</text:p>
      <text:p text:style-name="Normal">- Mensuel : test de restauration backup, mise à jour dépendances non-critiques</text:p>
      <text:p text:style-name="Normal">- Trimestriel : audit de sécurité, revue des performances</text:p>
      <text:p text:style-name="Normal">- Annuel : revue architecture, mise à jour majeure Laravel/PostgreSQL</text:p>
      <text:p text:style-name="Normal"/>
      <text:p text:style-name="Normal"><text:span text:style-name="T149">━━━━━━━━━━━━━━━━━━━━━━━━━━━━━━━━━━━━━━</text:span></text:p>
      <text:p text:style-name="Normal">PARTIE 7 — ORGANISATION D'ÉQUIPE &amp; SYNTHÈSE EXÉCUTIVE</text:p>
      <text:p text:style-name="Normal"><text:span text:style-name="T150">━━━━━━━━━━━━━━━━━━━━━━━━━━━━━━━━━━━━━━</text:span></text:p>
      <text:p text:style-name="Normal"/>
      <text:p text:style-name="Normal">## 7.1 Composition d'équipe recommandée</text:p>
      <text:p text:style-name="Normal">Pour chaque profil, définis : rôle, compétences requises, charge (ETP),</text:p>
      <text:p text:style-name="Normal">modules dont il est responsable, compétences critiques à former.</text:p>
      <text:p text:style-name="Normal"/>
      <text:p text:style-name="P151">Profils minimaux :</text:p>
      <text:p text:style-name="P152">- Tech Lead / Architecte (1 ETP) : Laravel senior, Vue.js, Keycloak, DevOps</text:p>
      <text:p text:style-name="Normal">- Développeur Backend (1-2 ETP) : PHP/Laravel, PostgreSQL, Redis</text:p>
      <text:p text:style-name="Normal">- Développeur Frontend (1 ETP) : Vue.js 3, Inertia.js, Tailwind CSS</text:p>
      <text:p text:style-name="Normal">- DevOps / Admin sys (0.5 ETP) : Docker, Nginx, CI/CD, monitoring</text:p>
      <text:p text:style-name="Normal"/>
      <text:soft-page-break/>
      <text:p text:style-name="Normal">Profils optionnels selon budget :</text:p>
      <text:p text:style-name="Normal">- UX Designer (0.5 ETP) : wireframes, WCAG, accessibilité</text:p>
      <text:p text:style-name="Normal">- Chef de projet / Scrum Master (0.5 ETP)</text:p>
      <text:p text:style-name="Normal"/>
      <text:p text:style-name="Normal">## 7.2 Conventions de développement Laravel/Vue.js</text:p>
      <text:p text:style-name="Normal">Définis les standards à adopter dès le Sprint 0 :</text:p>
      <text:p text:style-name="Normal"/>
      <text:p text:style-name="Normal">Conventions Laravel :</text:p>
      <text:p text:style-name="Normal">- Nommage : PSR-12, classes PascalCase, méthodes camelCase, BDD snake_case</text:p>
      <text:p text:style-name="Normal">- Structure : un Service par entité métier, pas de logique dans les Contrôleurs</text:p>
      <text:p text:style-name="Normal">- Eloquent : utiliser des Scopes pour les requêtes récurrentes</text:p>
      <text:p text:style-name="P153">- Migrations : nommage create_[table]_table, add_[col]_to_[table]_table</text:p>
      <text:p text:style-name="Normal">- Tests : TestCase par classe Service, DatabaseTransactions trait</text:p>
      <text:p text:style-name="Normal"/>
      <text:p text:style-name="Normal">Conventions Vue.js / Inertia.js :</text:p>
      <text:p text:style-name="Normal">- Composants : PascalCase, un composant par fichier</text:p>
      <text:p text:style-name="Normal">- Pages Inertia : dossier Pages/ organisé par module (Pages/Content/Index.vue)</text:p>
      <text:p text:style-name="Normal">- Composition API systématique (pas d'Options API)</text:p>
      <text:p text:style-name="Normal">- Tailwind : ne pas purger les classes dynamiques (safelist si nécessaire)</text:p>
      <text:p text:style-name="Normal"/>
      <text:p text:style-name="Normal">Convention de commits (Conventional Commits) :</text:p>
      <text:p text:style-name="Normal">feat(module): description | fix(module): description</text:p>
      <text:p text:style-name="Normal">chore: description | docs: description | test: description</text:p>
      <text:p text:style-name="Normal"/>
      <text:p text:style-name="Normal">Stratégie Git (GitFlow simplifié) :</text:p>
      <text:p text:style-name="Normal">- main : production uniquement, accès restreint</text:p>
      <text:p text:style-name="Normal">- develop : intégration continue</text:p>
      <text:p text:style-name="Normal">- feature/[module]-[description] : développement</text:p>
      <text:soft-page-break/>
      <text:p text:style-name="Normal">- release/[version] : préparation release</text:p>
      <text:p text:style-name="Normal">- hotfix/[description] : corrections urgentes production</text:p>
      <text:p text:style-name="Normal"/>
      <text:p text:style-name="Normal">## 7.3 Rituels agiles (équipe réduite, contexte UCAD)</text:p>
      <text:p text:style-name="Normal">Adapte les rituels à une équipe de 3-4 personnes en contexte universitaire :</text:p>
      <text:p text:style-name="Normal">- Sprint planning (2h tous les 2 semaines) : objectifs, découpage tâches, estimations</text:p>
      <text:p text:style-name="P154">- Daily standup asynchrone (Slack/WhatsApp) : hier / aujourd'hui / blocages</text:p>
      <text:p text:style-name="P155">- Sprint review (1h) : démo au PO + stakeholders sur staging</text:p>
      <text:p text:style-name="Normal">- Retrospective (45 min) : ce qui a bien marché / à améliorer / actions</text:p>
      <text:p text:style-name="Normal">- Backlog refinement (1h hebdo) : affinage des stories du prochain sprint</text:p>
      <text:p text:style-name="Normal"/>
      <text:p text:style-name="Normal">## 7.4 Plan d'action risques (6 risques prioritaires)</text:p>
      <text:p text:style-name="Normal">Pour chaque risque R-01 à R-06, détaille :</text:p>
      <text:p text:style-name="Normal">| Risque | Action concrète | Responsable | Deadline | Indicateur de succès | Escalade si |</text:p>
      <text:p text:style-name="Normal"/>
      <text:p text:style-name="Normal">## 7.5 Estimation budgétaire (jours/homme)</text:p>
      <text:p text:style-name="Normal">Produis le tableau d'estimation par catégorie :</text:p>
      <text:p text:style-name="Normal">| Catégorie | Jours/homme | Hypothèses |</text:p>
      <text:p text:style-name="Normal">- Sprint 0 (fondations)</text:p>
      <text:p text:style-name="Normal">- Sprints 1-4 (MVP)</text:p>
      <text:p text:style-name="Normal">- Sprints 5-8 (fonctionnalités avancées)</text:p>
      <text:p text:style-name="P156">- Sprint 9 (tests + sécurité + go-live)</text:p>
      <text:p text:style-name="Normal">- Management + documentation</text:p>
      <text:p text:style-name="Normal">- Marge risques (15%)</text:p>
      <text:p text:style-name="Normal">- TOTAL et équivalent en semaines/ETP</text:p>
      <text:p text:style-name="Normal"/>
      <text:p text:style-name="Normal">## 7.6 Synthèse exécutive (pour la direction UMMISCO)</text:p>
      <text:p text:style-name="Normal">Rédige un résumé exécutif structuré pour présentation à la direction :</text:p>
      <text:soft-page-break/>
      <text:p text:style-name="Normal">- Ce que le projet livrera (en langage non technique)</text:p>
      <text:p text:style-name="Normal">- Calendrier résumé avec les 4 jalons</text:p>
      <text:p text:style-name="Normal">- Ressources nécessaires (équipe + infrastructure)</text:p>
      <text:p text:style-name="Normal">- Les 3 décisions urgentes à prendre cette semaine</text:p>
      <text:p text:style-name="Normal">- Les bénéfices attendus à 6 mois et 1 an</text:p>
      <text:p text:style-name="Normal"/>
      <text:p text:style-name="Normal">## 7.7 Prochaines étapes immédiates (Semaine 1)</text:p>
      <text:p text:style-name="Normal">Liste les 10 actions concrètes à mener dans les 7 prochains jours :</text:p>
      <text:p text:style-name="Normal">| # | Action | Responsable | Livrable | Bloquant pour |</text:p>
      <text:p text:style-name="Normal">Inclure : arbitrage stack, consultation DSI UCAD, test Ollama,</text:p>
      <text:p text:style-name="Normal">validation URLs iframes, configuration repo Git,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pa Wade</meta:initial-creator>
    <dc:creator>Papa Wade</dc:creator>
    <meta:creation-date>2026-06-03T22:06:00Z</meta:creation-date>
    <dc:date>2026-06-04T10:23:00Z</dc:date>
    <meta:template xlink:href="Normal" xlink:type="simple"/>
    <meta:editing-cycles>1</meta:editing-cycles>
    <meta:editing-duration>PT43260S</meta:editing-duration>
    <meta:document-statistic meta:page-count="24" meta:paragraph-count="65" meta:word-count="5041" meta:character-count="32707" meta:row-count="231" meta:non-whitespace-character-count="27731"/>
  </office:meta>
</office:document-meta>
</file>